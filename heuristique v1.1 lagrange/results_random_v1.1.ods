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4.93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949cm"/>
    </style:style>
    <style:style style:name="co11" style:family="table-column">
      <style:table-column-properties fo:break-before="auto" style:column-width="4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random_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um_Variables</text:p>
          </table:table-cell>
          <table:table-cell office:value-type="string" calcext:value-type="string">
            <text:p>Num_Clauses</text:p>
          </table:table-cell>
          <table:table-cell office:value-type="string" calcext:value-type="string">
            <text:p>Violated_Weight heuristics 1</text:p>
          </table:table-cell>
          <table:table-cell table:style-name="ce1" office:value-type="string" calcext:value-type="string">
            <text:p>Time : heuristics 1</text:p>
          </table:table-cell>
          <table:table-cell office:value-type="string" calcext:value-type="string">
            <text:p>Violated weight : heuristics 2</text:p>
          </table:table-cell>
          <table:table-cell office:value-type="string" calcext:value-type="string">
            <text:p>Time heuristics 2</text:p>
          </table:table-cell>
          <table:table-cell office:value-type="string" calcext:value-type="string">
            <text:p>violated_weight_olllp</text:p>
          </table:table-cell>
          <table:table-cell office:value-type="string" calcext:value-type="string">
            <text:p>time_olllp</text:p>
          </table:table-cell>
          <table:table-cell office:value-type="string" calcext:value-type="string">
            <text:p>heuristics 1 versus olllp</text:p>
          </table:table-cell>
          <table:table-cell office:value-type="string" calcext:value-type="string">
            <text:p>Heuristics 2 versus olllp</text:p>
          </table:table-cell>
          <table:table-cell/>
        </table:table-row>
        <table:table-row table:style-name="ro1">
          <table:table-cell office:value-type="string" calcext:value-type="string">
            <text:p>test7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9329" calcext:value-type="float">
            <text:p>1219329</text:p>
          </table:table-cell>
          <table:table-cell office:value-type="string" calcext:value-type="string">
            <text:p>0.874586</text:p>
          </table:table-cell>
          <table:table-cell office:value-type="float" office:value="1204582" calcext:value-type="float">
            <text:p>1204582</text:p>
          </table:table-cell>
          <table:table-cell office:value-type="string" calcext:value-type="string">
            <text:p>0.905412</text:p>
          </table:table-cell>
          <table:table-cell office:value-type="float" office:value="1172679" calcext:value-type="float">
            <text:p>1172679</text:p>
          </table:table-cell>
          <table:table-cell table:formula="of:=1" office:value-type="float" office:value="1" calcext:value-type="float">
            <text:p>1</text:p>
          </table:table-cell>
          <table:table-cell table:formula="of:=IF([.D2]&lt;[.H2];&quot;MEILLEUR&quot;;&quot;MOINS BON&quot;)" office:value-type="string" office:string-value="MOINS BON" calcext:value-type="string">
            <text:p>MOINS BON</text:p>
          </table:table-cell>
          <table:table-cell table:formula="of:=IF([.F2]&lt;[.H2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4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957" calcext:value-type="float">
            <text:p>623957</text:p>
          </table:table-cell>
          <table:table-cell office:value-type="string" calcext:value-type="string">
            <text:p>0.650774</text:p>
          </table:table-cell>
          <table:table-cell office:value-type="float" office:value="608026" calcext:value-type="float">
            <text:p>608026</text:p>
          </table:table-cell>
          <table:table-cell office:value-type="string" calcext:value-type="string">
            <text:p>0.666658</text:p>
          </table:table-cell>
          <table:table-cell office:value-type="float" office:value="767151" calcext:value-type="float">
            <text:p>767151</text:p>
          </table:table-cell>
          <table:table-cell table:formula="of:=1" office:value-type="float" office:value="1" calcext:value-type="float">
            <text:p>1</text:p>
          </table:table-cell>
          <table:table-cell table:formula="of:=IF([.D3]&lt;[.H3];&quot;MEILLEUR&quot;;&quot;MOINS BON&quot;)" office:value-type="string" office:string-value="MEILLEUR" calcext:value-type="string">
            <text:p>MEILLEUR</text:p>
          </table:table-cell>
          <table:table-cell table:formula="of:=IF([.F3]&lt;[.H3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16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808" calcext:value-type="float">
            <text:p>1218808</text:p>
          </table:table-cell>
          <table:table-cell office:value-type="string" calcext:value-type="string">
            <text:p>0.636233</text:p>
          </table:table-cell>
          <table:table-cell office:value-type="float" office:value="1202542" calcext:value-type="float">
            <text:p>1202542</text:p>
          </table:table-cell>
          <table:table-cell office:value-type="string" calcext:value-type="string">
            <text:p>0.63392</text:p>
          </table:table-cell>
          <table:table-cell office:value-type="float" office:value="771357" calcext:value-type="float">
            <text:p>771357</text:p>
          </table:table-cell>
          <table:table-cell table:formula="of:=1" office:value-type="float" office:value="1" calcext:value-type="float">
            <text:p>1</text:p>
          </table:table-cell>
          <table:table-cell table:formula="of:=IF([.D4]&lt;[.H4];&quot;MEILLEUR&quot;;&quot;MOINS BON&quot;)" office:value-type="string" office:string-value="MOINS BON" calcext:value-type="string">
            <text:p>MOINS BON</text:p>
          </table:table-cell>
          <table:table-cell table:formula="of:=IF([.F4]&lt;[.H4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0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8295" calcext:value-type="float">
            <text:p>1188295</text:p>
          </table:table-cell>
          <table:table-cell office:value-type="string" calcext:value-type="string">
            <text:p>0.6207</text:p>
          </table:table-cell>
          <table:table-cell office:value-type="float" office:value="1178742" calcext:value-type="float">
            <text:p>1178742</text:p>
          </table:table-cell>
          <table:table-cell office:value-type="string" calcext:value-type="string">
            <text:p>0.668604</text:p>
          </table:table-cell>
          <table:table-cell office:value-type="float" office:value="1161690" calcext:value-type="float">
            <text:p>1161690</text:p>
          </table:table-cell>
          <table:table-cell table:formula="of:=1" office:value-type="float" office:value="1" calcext:value-type="float">
            <text:p>1</text:p>
          </table:table-cell>
          <table:table-cell table:formula="of:=IF([.D5]&lt;[.H5];&quot;MEILLEUR&quot;;&quot;MOINS BON&quot;)" office:value-type="string" office:string-value="MOINS BON" calcext:value-type="string">
            <text:p>MOINS BON</text:p>
          </table:table-cell>
          <table:table-cell table:formula="of:=IF([.F5]&lt;[.H5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5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155" calcext:value-type="float">
            <text:p>572155</text:p>
          </table:table-cell>
          <table:table-cell office:value-type="string" calcext:value-type="string">
            <text:p>0.657134</text:p>
          </table:table-cell>
          <table:table-cell office:value-type="float" office:value="557050" calcext:value-type="float">
            <text:p>557050</text:p>
          </table:table-cell>
          <table:table-cell office:value-type="string" calcext:value-type="string">
            <text:p>0.653731</text:p>
          </table:table-cell>
          <table:table-cell office:value-type="float" office:value="759872" calcext:value-type="float">
            <text:p>759872</text:p>
          </table:table-cell>
          <table:table-cell table:formula="of:=1" office:value-type="float" office:value="1" calcext:value-type="float">
            <text:p>1</text:p>
          </table:table-cell>
          <table:table-cell table:formula="of:=IF([.D6]&lt;[.H6];&quot;MEILLEUR&quot;;&quot;MOINS BON&quot;)" office:value-type="string" office:string-value="MEILLEUR" calcext:value-type="string">
            <text:p>MEILLEUR</text:p>
          </table:table-cell>
          <table:table-cell table:formula="of:=IF([.F6]&lt;[.H6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9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729" calcext:value-type="float">
            <text:p>623729</text:p>
          </table:table-cell>
          <table:table-cell office:value-type="string" calcext:value-type="string">
            <text:p>0.61951</text:p>
          </table:table-cell>
          <table:table-cell office:value-type="float" office:value="610612" calcext:value-type="float">
            <text:p>610612</text:p>
          </table:table-cell>
          <table:table-cell office:value-type="string" calcext:value-type="string">
            <text:p>0.703615</text:p>
          </table:table-cell>
          <table:table-cell office:value-type="float" office:value="764488" calcext:value-type="float">
            <text:p>764488</text:p>
          </table:table-cell>
          <table:table-cell table:formula="of:=1" office:value-type="float" office:value="1" calcext:value-type="float">
            <text:p>1</text:p>
          </table:table-cell>
          <table:table-cell table:formula="of:=IF([.D7]&lt;[.H7];&quot;MEILLEUR&quot;;&quot;MOINS BON&quot;)" office:value-type="string" office:string-value="MEILLEUR" calcext:value-type="string">
            <text:p>MEILLEUR</text:p>
          </table:table-cell>
          <table:table-cell table:formula="of:=IF([.F7]&lt;[.H7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12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531" calcext:value-type="float">
            <text:p>1009531</text:p>
          </table:table-cell>
          <table:table-cell office:value-type="string" calcext:value-type="string">
            <text:p>0.662348</text:p>
          </table:table-cell>
          <table:table-cell office:value-type="float" office:value="980062" calcext:value-type="float">
            <text:p>980062</text:p>
          </table:table-cell>
          <table:table-cell office:value-type="string" calcext:value-type="string">
            <text:p>0.68093</text:p>
          </table:table-cell>
          <table:table-cell office:value-type="float" office:value="762895" calcext:value-type="float">
            <text:p>762895</text:p>
          </table:table-cell>
          <table:table-cell table:formula="of:=1" office:value-type="float" office:value="1" calcext:value-type="float">
            <text:p>1</text:p>
          </table:table-cell>
          <table:table-cell table:formula="of:=IF([.D8]&lt;[.H8];&quot;MEILLEUR&quot;;&quot;MOINS BON&quot;)" office:value-type="string" office:string-value="MOINS BON" calcext:value-type="string">
            <text:p>MOINS BON</text:p>
          </table:table-cell>
          <table:table-cell table:formula="of:=IF([.F8]&lt;[.H8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9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3566" calcext:value-type="float">
            <text:p>1083566</text:p>
          </table:table-cell>
          <table:table-cell office:value-type="string" calcext:value-type="string">
            <text:p>0.683893</text:p>
          </table:table-cell>
          <table:table-cell office:value-type="float" office:value="1059725" calcext:value-type="float">
            <text:p>1059725</text:p>
          </table:table-cell>
          <table:table-cell office:value-type="string" calcext:value-type="string">
            <text:p>0.663265</text:p>
          </table:table-cell>
          <table:table-cell office:value-type="float" office:value="772469" calcext:value-type="float">
            <text:p>772469</text:p>
          </table:table-cell>
          <table:table-cell table:formula="of:=1" office:value-type="float" office:value="1" calcext:value-type="float">
            <text:p>1</text:p>
          </table:table-cell>
          <table:table-cell table:formula="of:=IF([.D9]&lt;[.H9];&quot;MEILLEUR&quot;;&quot;MOINS BON&quot;)" office:value-type="string" office:string-value="MOINS BON" calcext:value-type="string">
            <text:p>MOINS BON</text:p>
          </table:table-cell>
          <table:table-cell table:formula="of:=IF([.F9]&lt;[.H9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0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2643" calcext:value-type="float">
            <text:p>842643</text:p>
          </table:table-cell>
          <table:table-cell office:value-type="string" calcext:value-type="string">
            <text:p>0.658733</text:p>
          </table:table-cell>
          <table:table-cell office:value-type="float" office:value="807687" calcext:value-type="float">
            <text:p>807687</text:p>
          </table:table-cell>
          <table:table-cell office:value-type="string" calcext:value-type="string">
            <text:p>0.641943</text:p>
          </table:table-cell>
          <table:table-cell office:value-type="float" office:value="1176084" calcext:value-type="float">
            <text:p>1176084</text:p>
          </table:table-cell>
          <table:table-cell table:formula="of:=1" office:value-type="float" office:value="1" calcext:value-type="float">
            <text:p>1</text:p>
          </table:table-cell>
          <table:table-cell table:formula="of:=IF([.D10]&lt;[.H10];&quot;MEILLEUR&quot;;&quot;MOINS BON&quot;)" office:value-type="string" office:string-value="MEILLEUR" calcext:value-type="string">
            <text:p>MEILLEUR</text:p>
          </table:table-cell>
          <table:table-cell table:formula="of:=IF([.F10]&lt;[.H10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2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097" calcext:value-type="float">
            <text:p>563097</text:p>
          </table:table-cell>
          <table:table-cell office:value-type="string" calcext:value-type="string">
            <text:p>0.627513</text:p>
          </table:table-cell>
          <table:table-cell office:value-type="float" office:value="548146" calcext:value-type="float">
            <text:p>548146</text:p>
          </table:table-cell>
          <table:table-cell office:value-type="string" calcext:value-type="string">
            <text:p>0.637174</text:p>
          </table:table-cell>
          <table:table-cell office:value-type="float" office:value="755940" calcext:value-type="float">
            <text:p>755940</text:p>
          </table:table-cell>
          <table:table-cell table:formula="of:=1" office:value-type="float" office:value="1" calcext:value-type="float">
            <text:p>1</text:p>
          </table:table-cell>
          <table:table-cell table:formula="of:=IF([.D11]&lt;[.H11];&quot;MEILLEUR&quot;;&quot;MOINS BON&quot;)" office:value-type="string" office:string-value="MEILLEUR" calcext:value-type="string">
            <text:p>MEILLEUR</text:p>
          </table:table-cell>
          <table:table-cell table:formula="of:=IF([.F11]&lt;[.H11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1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6516" calcext:value-type="float">
            <text:p>1076516</text:p>
          </table:table-cell>
          <table:table-cell office:value-type="string" calcext:value-type="string">
            <text:p>0.624404</text:p>
          </table:table-cell>
          <table:table-cell office:value-type="float" office:value="1045397" calcext:value-type="float">
            <text:p>1045397</text:p>
          </table:table-cell>
          <table:table-cell office:value-type="string" calcext:value-type="string">
            <text:p>0.65757</text:p>
          </table:table-cell>
          <table:table-cell office:value-type="float" office:value="769873" calcext:value-type="float">
            <text:p>769873</text:p>
          </table:table-cell>
          <table:table-cell table:formula="of:=1" office:value-type="float" office:value="1" calcext:value-type="float">
            <text:p>1</text:p>
          </table:table-cell>
          <table:table-cell table:formula="of:=IF([.D12]&lt;[.H12];&quot;MEILLEUR&quot;;&quot;MOINS BON&quot;)" office:value-type="string" office:string-value="MOINS BON" calcext:value-type="string">
            <text:p>MOINS BON</text:p>
          </table:table-cell>
          <table:table-cell table:formula="of:=IF([.F12]&lt;[.H12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6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9472" calcext:value-type="float">
            <text:p>779472</text:p>
          </table:table-cell>
          <table:table-cell office:value-type="string" calcext:value-type="string">
            <text:p>0.624967</text:p>
          </table:table-cell>
          <table:table-cell office:value-type="float" office:value="743176" calcext:value-type="float">
            <text:p>743176</text:p>
          </table:table-cell>
          <table:table-cell office:value-type="string" calcext:value-type="string">
            <text:p>0.646876</text:p>
          </table:table-cell>
          <table:table-cell office:value-type="float" office:value="761792" calcext:value-type="float">
            <text:p>761792</text:p>
          </table:table-cell>
          <table:table-cell table:formula="of:=1" office:value-type="float" office:value="1" calcext:value-type="float">
            <text:p>1</text:p>
          </table:table-cell>
          <table:table-cell table:formula="of:=IF([.D13]&lt;[.H13];&quot;MEILLEUR&quot;;&quot;MOINS BON&quot;)" office:value-type="string" office:string-value="MOINS BON" calcext:value-type="string">
            <text:p>MOINS BON</text:p>
          </table:table-cell>
          <table:table-cell table:formula="of:=IF([.F13]&lt;[.H13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4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7511" calcext:value-type="float">
            <text:p>1247511</text:p>
          </table:table-cell>
          <table:table-cell office:value-type="string" calcext:value-type="string">
            <text:p>0.644611</text:p>
          </table:table-cell>
          <table:table-cell office:value-type="float" office:value="1246848" calcext:value-type="float">
            <text:p>1246848</text:p>
          </table:table-cell>
          <table:table-cell office:value-type="string" calcext:value-type="string">
            <text:p>0.658164</text:p>
          </table:table-cell>
          <table:table-cell office:value-type="float" office:value="762674" calcext:value-type="float">
            <text:p>762674</text:p>
          </table:table-cell>
          <table:table-cell table:formula="of:=1" office:value-type="float" office:value="1" calcext:value-type="float">
            <text:p>1</text:p>
          </table:table-cell>
          <table:table-cell table:formula="of:=IF([.D14]&lt;[.H14];&quot;MEILLEUR&quot;;&quot;MOINS BON&quot;)" office:value-type="string" office:string-value="MOINS BON" calcext:value-type="string">
            <text:p>MOINS BON</text:p>
          </table:table-cell>
          <table:table-cell table:formula="of:=IF([.F14]&lt;[.H14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7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744" calcext:value-type="float">
            <text:p>996744</text:p>
          </table:table-cell>
          <table:table-cell office:value-type="string" calcext:value-type="string">
            <text:p>0.636638</text:p>
          </table:table-cell>
          <table:table-cell office:value-type="float" office:value="968801" calcext:value-type="float">
            <text:p>968801</text:p>
          </table:table-cell>
          <table:table-cell office:value-type="string" calcext:value-type="string">
            <text:p>0.645847</text:p>
          </table:table-cell>
          <table:table-cell office:value-type="float" office:value="782551" calcext:value-type="float">
            <text:p>782551</text:p>
          </table:table-cell>
          <table:table-cell table:formula="of:=1" office:value-type="float" office:value="1" calcext:value-type="float">
            <text:p>1</text:p>
          </table:table-cell>
          <table:table-cell table:formula="of:=IF([.D15]&lt;[.H15];&quot;MEILLEUR&quot;;&quot;MOINS BON&quot;)" office:value-type="string" office:string-value="MOINS BON" calcext:value-type="string">
            <text:p>MOINS BON</text:p>
          </table:table-cell>
          <table:table-cell table:formula="of:=IF([.F15]&lt;[.H15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8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317" calcext:value-type="float">
            <text:p>565317</text:p>
          </table:table-cell>
          <table:table-cell office:value-type="string" calcext:value-type="string">
            <text:p>0.694635</text:p>
          </table:table-cell>
          <table:table-cell office:value-type="float" office:value="561995" calcext:value-type="float">
            <text:p>561995</text:p>
          </table:table-cell>
          <table:table-cell office:value-type="string" calcext:value-type="string">
            <text:p>0.659841</text:p>
          </table:table-cell>
          <table:table-cell office:value-type="float" office:value="1169243" calcext:value-type="float">
            <text:p>1169243</text:p>
          </table:table-cell>
          <table:table-cell table:formula="of:=1" office:value-type="float" office:value="1" calcext:value-type="float">
            <text:p>1</text:p>
          </table:table-cell>
          <table:table-cell table:formula="of:=IF([.D16]&lt;[.H16];&quot;MEILLEUR&quot;;&quot;MOINS BON&quot;)" office:value-type="string" office:string-value="MEILLEUR" calcext:value-type="string">
            <text:p>MEILLEUR</text:p>
          </table:table-cell>
          <table:table-cell table:formula="of:=IF([.F16]&lt;[.H16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5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101" calcext:value-type="float">
            <text:p>566101</text:p>
          </table:table-cell>
          <table:table-cell office:value-type="string" calcext:value-type="string">
            <text:p>0.642897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0.658759</text:p>
          </table:table-cell>
          <table:table-cell office:value-type="float" office:value="764102" calcext:value-type="float">
            <text:p>764102</text:p>
          </table:table-cell>
          <table:table-cell table:formula="of:=1" office:value-type="float" office:value="1" calcext:value-type="float">
            <text:p>1</text:p>
          </table:table-cell>
          <table:table-cell table:formula="of:=IF([.D17]&lt;[.H17];&quot;MEILLEUR&quot;;&quot;MOINS BON&quot;)" office:value-type="string" office:string-value="MEILLEUR" calcext:value-type="string">
            <text:p>MEILLEUR</text:p>
          </table:table-cell>
          <table:table-cell table:formula="of:=IF([.F17]&lt;[.H17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13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697" calcext:value-type="float">
            <text:p>581697</text:p>
          </table:table-cell>
          <table:table-cell office:value-type="string" calcext:value-type="string">
            <text:p>0.674887</text:p>
          </table:table-cell>
          <table:table-cell office:value-type="float" office:value="555525" calcext:value-type="float">
            <text:p>555525</text:p>
          </table:table-cell>
          <table:table-cell office:value-type="string" calcext:value-type="string">
            <text:p>0.645866</text:p>
          </table:table-cell>
          <table:table-cell office:value-type="float" office:value="774625" calcext:value-type="float">
            <text:p>774625</text:p>
          </table:table-cell>
          <table:table-cell table:formula="of:=1" office:value-type="float" office:value="1" calcext:value-type="float">
            <text:p>1</text:p>
          </table:table-cell>
          <table:table-cell table:formula="of:=IF([.D18]&lt;[.H18];&quot;MEILLEUR&quot;;&quot;MOINS BON&quot;)" office:value-type="string" office:string-value="MEILLEUR" calcext:value-type="string">
            <text:p>MEILLEUR</text:p>
          </table:table-cell>
          <table:table-cell table:formula="of:=IF([.F18]&lt;[.H18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3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275" calcext:value-type="float">
            <text:p>566275</text:p>
          </table:table-cell>
          <table:table-cell office:value-type="string" calcext:value-type="string">
            <text:p>0.646727</text:p>
          </table:table-cell>
          <table:table-cell office:value-type="float" office:value="558841" calcext:value-type="float">
            <text:p>558841</text:p>
          </table:table-cell>
          <table:table-cell office:value-type="string" calcext:value-type="string">
            <text:p>0.655589</text:p>
          </table:table-cell>
          <table:table-cell office:value-type="float" office:value="1164000" calcext:value-type="float">
            <text:p>1164000</text:p>
          </table:table-cell>
          <table:table-cell table:formula="of:=1" office:value-type="float" office:value="1" calcext:value-type="float">
            <text:p>1</text:p>
          </table:table-cell>
          <table:table-cell table:formula="of:=IF([.D19]&lt;[.H19];&quot;MEILLEUR&quot;;&quot;MOINS BON&quot;)" office:value-type="string" office:string-value="MEILLEUR" calcext:value-type="string">
            <text:p>MEILLEUR</text:p>
          </table:table-cell>
          <table:table-cell table:formula="of:=IF([.F19]&lt;[.H19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11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9305" calcext:value-type="float">
            <text:p>1049305</text:p>
          </table:table-cell>
          <table:table-cell office:value-type="string" calcext:value-type="string">
            <text:p>0.666687</text:p>
          </table:table-cell>
          <table:table-cell office:value-type="float" office:value="1018415" calcext:value-type="float">
            <text:p>1018415</text:p>
          </table:table-cell>
          <table:table-cell office:value-type="string" calcext:value-type="string">
            <text:p>0.652534</text:p>
          </table:table-cell>
          <table:table-cell office:value-type="float" office:value="767492" calcext:value-type="float">
            <text:p>767492</text:p>
          </table:table-cell>
          <table:table-cell table:formula="of:=1" office:value-type="float" office:value="1" calcext:value-type="float">
            <text:p>1</text:p>
          </table:table-cell>
          <table:table-cell table:formula="of:=IF([.D20]&lt;[.H20];&quot;MEILLEUR&quot;;&quot;MOINS BON&quot;)" office:value-type="string" office:string-value="MOINS BON" calcext:value-type="string">
            <text:p>MOINS BON</text:p>
          </table:table-cell>
          <table:table-cell table:formula="of:=IF([.F20]&lt;[.H20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8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8598" calcext:value-type="float">
            <text:p>1068598</text:p>
          </table:table-cell>
          <table:table-cell office:value-type="string" calcext:value-type="string">
            <text:p>0.63821</text:p>
          </table:table-cell>
          <table:table-cell office:value-type="float" office:value="1036807" calcext:value-type="float">
            <text:p>1036807</text:p>
          </table:table-cell>
          <table:table-cell office:value-type="string" calcext:value-type="string">
            <text:p>0.631831</text:p>
          </table:table-cell>
          <table:table-cell office:value-type="float" office:value="761722" calcext:value-type="float">
            <text:p>761722</text:p>
          </table:table-cell>
          <table:table-cell table:formula="of:=1" office:value-type="float" office:value="1" calcext:value-type="float">
            <text:p>1</text:p>
          </table:table-cell>
          <table:table-cell table:formula="of:=IF([.D21]&lt;[.H21];&quot;MEILLEUR&quot;;&quot;MOINS BON&quot;)" office:value-type="string" office:string-value="MOINS BON" calcext:value-type="string">
            <text:p>MOINS BON</text:p>
          </table:table-cell>
          <table:table-cell table:formula="of:=IF([.F21]&lt;[.H21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 avec 200,000 variables et 1,000,000 de claus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7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02348" calcext:value-type="float">
            <text:p>12602348</text:p>
          </table:table-cell>
          <table:table-cell office:value-type="string" calcext:value-type="string">
            <text:p>42.5051</text:p>
          </table:table-cell>
          <table:table-cell office:value-type="float" office:value="12577021" calcext:value-type="float">
            <text:p>12577021</text:p>
          </table:table-cell>
          <table:table-cell office:value-type="string" calcext:value-type="string">
            <text:p>35.3297</text:p>
          </table:table-cell>
          <table:table-cell office:value-type="float" office:value="11727331" calcext:value-type="float">
            <text:p>11727331</text:p>
          </table:table-cell>
          <table:table-cell table:formula="of:=45" office:value-type="float" office:value="45" calcext:value-type="float">
            <text:p>45</text:p>
          </table:table-cell>
          <table:table-cell table:formula="of:=IF([.D23]&lt;[.H23];&quot;MEILLEUR&quot;;&quot;MOINS BON&quot;)" office:value-type="string" office:string-value="MOINS BON" calcext:value-type="string">
            <text:p>MOINS BON</text:p>
          </table:table-cell>
          <table:table-cell table:formula="of:=IF([.F23]&lt;[.H23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4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04055" calcext:value-type="float">
            <text:p>12604055</text:p>
          </table:table-cell>
          <table:table-cell office:value-type="string" calcext:value-type="string">
            <text:p>42.4145</text:p>
          </table:table-cell>
          <table:table-cell office:value-type="float" office:value="12603161" calcext:value-type="float">
            <text:p>12603161</text:p>
          </table:table-cell>
          <table:table-cell office:value-type="string" calcext:value-type="string">
            <text:p>32.9852</text:p>
          </table:table-cell>
          <table:table-cell office:value-type="float" office:value="7606348" calcext:value-type="float">
            <text:p>7606348</text:p>
          </table:table-cell>
          <table:table-cell table:formula="of:=45" office:value-type="float" office:value="45" calcext:value-type="float">
            <text:p>45</text:p>
          </table:table-cell>
          <table:table-cell table:formula="of:=IF([.D24]&lt;[.H24];&quot;MEILLEUR&quot;;&quot;MOINS BON&quot;)" office:value-type="string" office:string-value="MOINS BON" calcext:value-type="string">
            <text:p>MOINS BON</text:p>
          </table:table-cell>
          <table:table-cell table:formula="of:=IF([.F24]&lt;[.H24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6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19257" calcext:value-type="float">
            <text:p>12519257</text:p>
          </table:table-cell>
          <table:table-cell office:value-type="string" calcext:value-type="string">
            <text:p>43.4697</text:p>
          </table:table-cell>
          <table:table-cell office:value-type="float" office:value="12486946" calcext:value-type="float">
            <text:p>12486946</text:p>
          </table:table-cell>
          <table:table-cell office:value-type="string" calcext:value-type="string">
            <text:p>32.6794</text:p>
          </table:table-cell>
          <table:table-cell office:value-type="float" office:value="7595274" calcext:value-type="float">
            <text:p>7595274</text:p>
          </table:table-cell>
          <table:table-cell table:formula="of:=45" office:value-type="float" office:value="45" calcext:value-type="float">
            <text:p>45</text:p>
          </table:table-cell>
          <table:table-cell table:formula="of:=IF([.D25]&lt;[.H25];&quot;MEILLEUR&quot;;&quot;MOINS BON&quot;)" office:value-type="string" office:string-value="MOINS BON" calcext:value-type="string">
            <text:p>MOINS BON</text:p>
          </table:table-cell>
          <table:table-cell table:formula="of:=IF([.F25]&lt;[.H25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0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62759" calcext:value-type="float">
            <text:p>11262759</text:p>
          </table:table-cell>
          <table:table-cell office:value-type="string" calcext:value-type="string">
            <text:p>41.6074</text:p>
          </table:table-cell>
          <table:table-cell office:value-type="float" office:value="11041377" calcext:value-type="float">
            <text:p>11041377</text:p>
          </table:table-cell>
          <table:table-cell office:value-type="string" calcext:value-type="string">
            <text:p>33.9262</text:p>
          </table:table-cell>
          <table:table-cell office:value-type="float" office:value="7599138" calcext:value-type="float">
            <text:p>7599138</text:p>
          </table:table-cell>
          <table:table-cell table:formula="of:=45" office:value-type="float" office:value="45" calcext:value-type="float">
            <text:p>45</text:p>
          </table:table-cell>
          <table:table-cell table:formula="of:=IF([.D26]&lt;[.H26];&quot;MEILLEUR&quot;;&quot;MOINS BON&quot;)" office:value-type="string" office:string-value="MOINS BON" calcext:value-type="string">
            <text:p>MOINS BON</text:p>
          </table:table-cell>
          <table:table-cell table:formula="of:=IF([.F26]&lt;[.H26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5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64863" calcext:value-type="float">
            <text:p>12464863</text:p>
          </table:table-cell>
          <table:table-cell office:value-type="string" calcext:value-type="string">
            <text:p>42.3505</text:p>
          </table:table-cell>
          <table:table-cell office:value-type="float" office:value="12419633" calcext:value-type="float">
            <text:p>12419633</text:p>
          </table:table-cell>
          <table:table-cell office:value-type="string" calcext:value-type="string">
            <text:p>39.9694</text:p>
          </table:table-cell>
          <table:table-cell office:value-type="float" office:value="7596620" calcext:value-type="float">
            <text:p>7596620</text:p>
          </table:table-cell>
          <table:table-cell table:formula="of:=45" office:value-type="float" office:value="45" calcext:value-type="float">
            <text:p>45</text:p>
          </table:table-cell>
          <table:table-cell table:formula="of:=IF([.D27]&lt;[.H27];&quot;MEILLEUR&quot;;&quot;MOINS BON&quot;)" office:value-type="string" office:string-value="MOINS BON" calcext:value-type="string">
            <text:p>MOINS BON</text:p>
          </table:table-cell>
          <table:table-cell table:formula="of:=IF([.F27]&lt;[.H27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9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60483" calcext:value-type="float">
            <text:p>12560483</text:p>
          </table:table-cell>
          <table:table-cell office:value-type="string" calcext:value-type="string">
            <text:p>41.8444</text:p>
          </table:table-cell>
          <table:table-cell office:value-type="float" office:value="12553147" calcext:value-type="float">
            <text:p>12553147</text:p>
          </table:table-cell>
          <table:table-cell office:value-type="string" calcext:value-type="string">
            <text:p>33.4725</text:p>
          </table:table-cell>
          <table:table-cell office:value-type="float" office:value="7605709" calcext:value-type="float">
            <text:p>7605709</text:p>
          </table:table-cell>
          <table:table-cell table:formula="of:=45" office:value-type="float" office:value="45" calcext:value-type="float">
            <text:p>45</text:p>
          </table:table-cell>
          <table:table-cell table:formula="of:=IF([.D28]&lt;[.H28];&quot;MEILLEUR&quot;;&quot;MOINS BON&quot;)" office:value-type="string" office:string-value="MOINS BON" calcext:value-type="string">
            <text:p>MOINS BON</text:p>
          </table:table-cell>
          <table:table-cell table:formula="of:=IF([.F28]&lt;[.H28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2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27973" calcext:value-type="float">
            <text:p>12627973</text:p>
          </table:table-cell>
          <table:table-cell office:value-type="string" calcext:value-type="string">
            <text:p>41.9354</text:p>
          </table:table-cell>
          <table:table-cell office:value-type="float" office:value="12624239" calcext:value-type="float">
            <text:p>12624239</text:p>
          </table:table-cell>
          <table:table-cell office:value-type="string" calcext:value-type="string">
            <text:p>32.2516</text:p>
          </table:table-cell>
          <table:table-cell office:value-type="float" office:value="7615846" calcext:value-type="float">
            <text:p>7615846</text:p>
          </table:table-cell>
          <table:table-cell table:formula="of:=45" office:value-type="float" office:value="45" calcext:value-type="float">
            <text:p>45</text:p>
          </table:table-cell>
          <table:table-cell table:formula="of:=IF([.D29]&lt;[.H29];&quot;MEILLEUR&quot;;&quot;MOINS BON&quot;)" office:value-type="string" office:string-value="MOINS BON" calcext:value-type="string">
            <text:p>MOINS BON</text:p>
          </table:table-cell>
          <table:table-cell table:formula="of:=IF([.F29]&lt;[.H29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9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13259" calcext:value-type="float">
            <text:p>11513259</text:p>
          </table:table-cell>
          <table:table-cell office:value-type="string" calcext:value-type="string">
            <text:p>42.9789</text:p>
          </table:table-cell>
          <table:table-cell office:value-type="float" office:value="11317251" calcext:value-type="float">
            <text:p>11317251</text:p>
          </table:table-cell>
          <table:table-cell office:value-type="string" calcext:value-type="string">
            <text:p>32.7785</text:p>
          </table:table-cell>
          <table:table-cell office:value-type="float" office:value="7620013" calcext:value-type="float">
            <text:p>7620013</text:p>
          </table:table-cell>
          <table:table-cell table:formula="of:=45" office:value-type="float" office:value="45" calcext:value-type="float">
            <text:p>45</text:p>
          </table:table-cell>
          <table:table-cell table:formula="of:=IF([.D30]&lt;[.H30];&quot;MEILLEUR&quot;;&quot;MOINS BON&quot;)" office:value-type="string" office:string-value="MOINS BON" calcext:value-type="string">
            <text:p>MOINS BON</text:p>
          </table:table-cell>
          <table:table-cell table:formula="of:=IF([.F30]&lt;[.H30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0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19727" calcext:value-type="float">
            <text:p>12319727</text:p>
          </table:table-cell>
          <table:table-cell office:value-type="string" calcext:value-type="string">
            <text:p>44.8304</text:p>
          </table:table-cell>
          <table:table-cell office:value-type="float" office:value="12236875" calcext:value-type="float">
            <text:p>12236875</text:p>
          </table:table-cell>
          <table:table-cell office:value-type="string" calcext:value-type="string">
            <text:p>33.8607</text:p>
          </table:table-cell>
          <table:table-cell office:value-type="float" office:value="7626004" calcext:value-type="float">
            <text:p>7626004</text:p>
          </table:table-cell>
          <table:table-cell table:formula="of:=45" office:value-type="float" office:value="45" calcext:value-type="float">
            <text:p>45</text:p>
          </table:table-cell>
          <table:table-cell table:formula="of:=IF([.D31]&lt;[.H31];&quot;MEILLEUR&quot;;&quot;MOINS BON&quot;)" office:value-type="string" office:string-value="MOINS BON" calcext:value-type="string">
            <text:p>MOINS BON</text:p>
          </table:table-cell>
          <table:table-cell table:formula="of:=IF([.F31]&lt;[.H31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2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71788" calcext:value-type="float">
            <text:p>10671788</text:p>
          </table:table-cell>
          <table:table-cell office:value-type="string" calcext:value-type="string">
            <text:p>43.2346</text:p>
          </table:table-cell>
          <table:table-cell office:value-type="float" office:value="10350761" calcext:value-type="float">
            <text:p>10350761</text:p>
          </table:table-cell>
          <table:table-cell office:value-type="string" calcext:value-type="string">
            <text:p>35.9591</text:p>
          </table:table-cell>
          <table:table-cell office:value-type="float" office:value="11702376" calcext:value-type="float">
            <text:p>11702376</text:p>
          </table:table-cell>
          <table:table-cell table:formula="of:=45" office:value-type="float" office:value="45" calcext:value-type="float">
            <text:p>45</text:p>
          </table:table-cell>
          <table:table-cell table:formula="of:=IF([.D32]&lt;[.H32];&quot;MEILLEUR&quot;;&quot;MOINS BON&quot;)" office:value-type="string" office:string-value="MEILLEUR" calcext:value-type="string">
            <text:p>MEILLEUR</text:p>
          </table:table-cell>
          <table:table-cell table:formula="of:=IF([.F32]&lt;[.H32];&quot;MEILLEUR&quot;;&quot;MOINS BON&quot;)" office:value-type="string" office:string-value="MEILLEUR" calcext:value-type="string">
            <text:p>MEILLEUR</text:p>
          </table:table-cell>
          <table:table-cell/>
        </table:table-row>
        <table:table-row table:style-name="ro1">
          <table:table-cell office:value-type="string" calcext:value-type="string">
            <text:p>test1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76792" calcext:value-type="float">
            <text:p>12576792</text:p>
          </table:table-cell>
          <table:table-cell office:value-type="string" calcext:value-type="string">
            <text:p>43.1087</text:p>
          </table:table-cell>
          <table:table-cell office:value-type="float" office:value="12566997" calcext:value-type="float">
            <text:p>12566997</text:p>
          </table:table-cell>
          <table:table-cell office:value-type="string" calcext:value-type="string">
            <text:p>32.7345</text:p>
          </table:table-cell>
          <table:table-cell office:value-type="float" office:value="11682246" calcext:value-type="float">
            <text:p>11682246</text:p>
          </table:table-cell>
          <table:table-cell table:formula="of:=45" office:value-type="float" office:value="45" calcext:value-type="float">
            <text:p>45</text:p>
          </table:table-cell>
          <table:table-cell table:formula="of:=IF([.D33]&lt;[.H33];&quot;MEILLEUR&quot;;&quot;MOINS BON&quot;)" office:value-type="string" office:string-value="MOINS BON" calcext:value-type="string">
            <text:p>MOINS BON</text:p>
          </table:table-cell>
          <table:table-cell table:formula="of:=IF([.F33]&lt;[.H33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6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9133" calcext:value-type="float">
            <text:p>12009133</text:p>
          </table:table-cell>
          <table:table-cell office:value-type="string" calcext:value-type="string">
            <text:p>42.5804</text:p>
          </table:table-cell>
          <table:table-cell office:value-type="float" office:value="11859607" calcext:value-type="float">
            <text:p>11859607</text:p>
          </table:table-cell>
          <table:table-cell office:value-type="string" calcext:value-type="string">
            <text:p>33.1958</text:p>
          </table:table-cell>
          <table:table-cell office:value-type="float" office:value="7597973" calcext:value-type="float">
            <text:p>7597973</text:p>
          </table:table-cell>
          <table:table-cell table:formula="of:=45" office:value-type="float" office:value="45" calcext:value-type="float">
            <text:p>45</text:p>
          </table:table-cell>
          <table:table-cell table:formula="of:=IF([.D34]&lt;[.H34];&quot;MEILLEUR&quot;;&quot;MOINS BON&quot;)" office:value-type="string" office:string-value="MOINS BON" calcext:value-type="string">
            <text:p>MOINS BON</text:p>
          </table:table-cell>
          <table:table-cell table:formula="of:=IF([.F34]&lt;[.H34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4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15781" calcext:value-type="float">
            <text:p>12415781</text:p>
          </table:table-cell>
          <table:table-cell office:value-type="string" calcext:value-type="string">
            <text:p>42.3777</text:p>
          </table:table-cell>
          <table:table-cell office:value-type="float" office:value="12352799" calcext:value-type="float">
            <text:p>12352799</text:p>
          </table:table-cell>
          <table:table-cell office:value-type="string" calcext:value-type="string">
            <text:p>33.3873</text:p>
          </table:table-cell>
          <table:table-cell office:value-type="float" office:value="7604377" calcext:value-type="float">
            <text:p>7604377</text:p>
          </table:table-cell>
          <table:table-cell table:formula="of:=45" office:value-type="float" office:value="45" calcext:value-type="float">
            <text:p>45</text:p>
          </table:table-cell>
          <table:table-cell table:formula="of:=IF([.D35]&lt;[.H35];&quot;MEILLEUR&quot;;&quot;MOINS BON&quot;)" office:value-type="string" office:string-value="MOINS BON" calcext:value-type="string">
            <text:p>MOINS BON</text:p>
          </table:table-cell>
          <table:table-cell table:formula="of:=IF([.F35]&lt;[.H35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7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43884" calcext:value-type="float">
            <text:p>12443884</text:p>
          </table:table-cell>
          <table:table-cell office:value-type="string" calcext:value-type="string">
            <text:p>42.326</text:p>
          </table:table-cell>
          <table:table-cell office:value-type="float" office:value="12409323" calcext:value-type="float">
            <text:p>12409323</text:p>
          </table:table-cell>
          <table:table-cell office:value-type="string" calcext:value-type="string">
            <text:p>36.3074</text:p>
          </table:table-cell>
          <table:table-cell office:value-type="float" office:value="7590534" calcext:value-type="float">
            <text:p>7590534</text:p>
          </table:table-cell>
          <table:table-cell table:formula="of:=45" office:value-type="float" office:value="45" calcext:value-type="float">
            <text:p>45</text:p>
          </table:table-cell>
          <table:table-cell table:formula="of:=IF([.D36]&lt;[.H36];&quot;MEILLEUR&quot;;&quot;MOINS BON&quot;)" office:value-type="string" office:string-value="MOINS BON" calcext:value-type="string">
            <text:p>MOINS BON</text:p>
          </table:table-cell>
          <table:table-cell table:formula="of:=IF([.F36]&lt;[.H36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8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65231" calcext:value-type="float">
            <text:p>12365231</text:p>
          </table:table-cell>
          <table:table-cell office:value-type="string" calcext:value-type="string">
            <text:p>43.478</text:p>
          </table:table-cell>
          <table:table-cell office:value-type="float" office:value="12295119" calcext:value-type="float">
            <text:p>12295119</text:p>
          </table:table-cell>
          <table:table-cell office:value-type="string" calcext:value-type="string">
            <text:p>32.6695</text:p>
          </table:table-cell>
          <table:table-cell office:value-type="float" office:value="7569798" calcext:value-type="float">
            <text:p>7569798</text:p>
          </table:table-cell>
          <table:table-cell table:formula="of:=45" office:value-type="float" office:value="45" calcext:value-type="float">
            <text:p>45</text:p>
          </table:table-cell>
          <table:table-cell table:formula="of:=IF([.D37]&lt;[.H37];&quot;MEILLEUR&quot;;&quot;MOINS BON&quot;)" office:value-type="string" office:string-value="MOINS BON" calcext:value-type="string">
            <text:p>MOINS BON</text:p>
          </table:table-cell>
          <table:table-cell table:formula="of:=IF([.F37]&lt;[.H37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5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22675" calcext:value-type="float">
            <text:p>12622675</text:p>
          </table:table-cell>
          <table:table-cell office:value-type="string" calcext:value-type="string">
            <text:p>42.0827</text:p>
          </table:table-cell>
          <table:table-cell office:value-type="float" office:value="12622597" calcext:value-type="float">
            <text:p>12622597</text:p>
          </table:table-cell>
          <table:table-cell office:value-type="string" calcext:value-type="string">
            <text:p>33.3239</text:p>
          </table:table-cell>
          <table:table-cell office:value-type="float" office:value="7578986" calcext:value-type="float">
            <text:p>7578986</text:p>
          </table:table-cell>
          <table:table-cell table:formula="of:=45" office:value-type="float" office:value="45" calcext:value-type="float">
            <text:p>45</text:p>
          </table:table-cell>
          <table:table-cell table:formula="of:=IF([.D38]&lt;[.H38];&quot;MEILLEUR&quot;;&quot;MOINS BON&quot;)" office:value-type="string" office:string-value="MOINS BON" calcext:value-type="string">
            <text:p>MOINS BON</text:p>
          </table:table-cell>
          <table:table-cell table:formula="of:=IF([.F38]&lt;[.H38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3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21400" calcext:value-type="float">
            <text:p>11721400</text:p>
          </table:table-cell>
          <table:table-cell office:value-type="string" calcext:value-type="string">
            <text:p>42.0507</text:p>
          </table:table-cell>
          <table:table-cell office:value-type="float" office:value="11548669" calcext:value-type="float">
            <text:p>11548669</text:p>
          </table:table-cell>
          <table:table-cell office:value-type="string" calcext:value-type="string">
            <text:p>34.9069</text:p>
          </table:table-cell>
          <table:table-cell office:value-type="float" office:value="7610189" calcext:value-type="float">
            <text:p>7610189</text:p>
          </table:table-cell>
          <table:table-cell table:formula="of:=45" office:value-type="float" office:value="45" calcext:value-type="float">
            <text:p>45</text:p>
          </table:table-cell>
          <table:table-cell table:formula="of:=IF([.D39]&lt;[.H39];&quot;MEILLEUR&quot;;&quot;MOINS BON&quot;)" office:value-type="string" office:string-value="MOINS BON" calcext:value-type="string">
            <text:p>MOINS BON</text:p>
          </table:table-cell>
          <table:table-cell table:formula="of:=IF([.F39]&lt;[.H39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3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51595" calcext:value-type="float">
            <text:p>12451595</text:p>
          </table:table-cell>
          <table:table-cell office:value-type="string" calcext:value-type="string">
            <text:p>43.1018</text:p>
          </table:table-cell>
          <table:table-cell office:value-type="float" office:value="12396666" calcext:value-type="float">
            <text:p>12396666</text:p>
          </table:table-cell>
          <table:table-cell office:value-type="string" calcext:value-type="string">
            <text:p>37.4525</text:p>
          </table:table-cell>
          <table:table-cell office:value-type="float" office:value="11732109" calcext:value-type="float">
            <text:p>11732109</text:p>
          </table:table-cell>
          <table:table-cell table:formula="of:=45" office:value-type="float" office:value="45" calcext:value-type="float">
            <text:p>45</text:p>
          </table:table-cell>
          <table:table-cell table:formula="of:=IF([.D40]&lt;[.H40];&quot;MEILLEUR&quot;;&quot;MOINS BON&quot;)" office:value-type="string" office:string-value="MOINS BON" calcext:value-type="string">
            <text:p>MOINS BON</text:p>
          </table:table-cell>
          <table:table-cell table:formula="of:=IF([.F40]&lt;[.H40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1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54120" calcext:value-type="float">
            <text:p>12054120</text:p>
          </table:table-cell>
          <table:table-cell office:value-type="string" calcext:value-type="string">
            <text:p>43.7256</text:p>
          </table:table-cell>
          <table:table-cell office:value-type="float" office:value="11919787" calcext:value-type="float">
            <text:p>11919787</text:p>
          </table:table-cell>
          <table:table-cell office:value-type="string" calcext:value-type="string">
            <text:p>36.455</text:p>
          </table:table-cell>
          <table:table-cell office:value-type="float" office:value="7633835" calcext:value-type="float">
            <text:p>7633835</text:p>
          </table:table-cell>
          <table:table-cell table:formula="of:=45" office:value-type="float" office:value="45" calcext:value-type="float">
            <text:p>45</text:p>
          </table:table-cell>
          <table:table-cell table:formula="of:=IF([.D41]&lt;[.H41];&quot;MEILLEUR&quot;;&quot;MOINS BON&quot;)" office:value-type="string" office:string-value="MOINS BON" calcext:value-type="string">
            <text:p>MOINS BON</text:p>
          </table:table-cell>
          <table:table-cell table:formula="of:=IF([.F41]&lt;[.H41];&quot;MEILLEUR&quot;;&quot;MOINS BON&quot;)" office:value-type="string" office:string-value="MOINS BON" calcext:value-type="string">
            <text:p>MOINS BON</text:p>
          </table:table-cell>
          <table:table-cell/>
        </table:table-row>
        <table:table-row table:style-name="ro1">
          <table:table-cell office:value-type="string" calcext:value-type="string">
            <text:p>test18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18161" calcext:value-type="float">
            <text:p>12518161</text:p>
          </table:table-cell>
          <table:table-cell office:value-type="string" calcext:value-type="string">
            <text:p>43.4831</text:p>
          </table:table-cell>
          <table:table-cell office:value-type="float" office:value="12505401" calcext:value-type="float">
            <text:p>12505401</text:p>
          </table:table-cell>
          <table:table-cell office:value-type="string" calcext:value-type="string">
            <text:p>35.4366</text:p>
          </table:table-cell>
          <table:table-cell office:value-type="float" office:value="7630567" calcext:value-type="float">
            <text:p>7630567</text:p>
          </table:table-cell>
          <table:table-cell table:formula="of:=45" office:value-type="float" office:value="45" calcext:value-type="float">
            <text:p>45</text:p>
          </table:table-cell>
          <table:table-cell table:formula="of:=IF([.D42]&lt;[.H42];&quot;MEILLEUR&quot;;&quot;MOINS BON&quot;)" office:value-type="string" office:string-value="MOINS BON" calcext:value-type="string">
            <text:p>MOINS BON</text:p>
          </table:table-cell>
          <table:table-cell table:formula="of:=IF([.F42]&lt;[.H42];&quot;MEILLEUR&quot;;&quot;MOINS BON&quot;)" office:value-type="string" office:string-value="MOINS BON" calcext:value-type="string">
            <text:p>MOINS B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6:12:11.199032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3T16:43:01.601749815</dc:date>
    <meta:editing-duration>PT43M51S</meta:editing-duration>
    <meta:editing-cycles>15</meta:editing-cycles>
    <meta:generator>LibreOffice/24.2.7.2$Linux_X86_64 LibreOffice_project/420$Build-2</meta:generator>
    <meta:document-statistic meta:table-count="1" meta:cell-count="452" meta:object-count="0"/>
  </office:meta>
</office:document-meta>
</file>