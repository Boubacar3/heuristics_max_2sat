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s de l’heuristique v1 randomisée sur 1 seco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andomized heuristics</text:p>
          </table:table-cell>
          <table:table-cell office:value-type="string" calcext:value-type="string">
            <text:p>OLLLP Results</text:p>
          </table:table-cell>
          <table:table-cell/>
        </table:table-row>
        <table:table-row table:style-name="ro1">
          <table:table-cell office:value-type="string" calcext:value-type="string">
            <text:p>grid40x40.f10_direct.wcnf</text:p>
          </table:table-cell>
          <table:table-cell office:value-type="float" office:value="780845" calcext:value-type="float">
            <text:p>780845</text:p>
          </table:table-cell>
          <table:table-cell office:value-type="float" office:value="862459" calcext:value-type="float">
            <text:p>862459</text:p>
          </table:table-cell>
          <table:table-cell/>
        </table:table-row>
        <table:table-row table:style-name="ro1">
          <table:table-cell office:value-type="string" calcext:value-type="string">
            <text:p>grid40x40.f5_direct.wcnf</text:p>
          </table:table-cell>
          <table:table-cell office:value-type="float" office:value="416934" calcext:value-type="float">
            <text:p>416934</text:p>
          </table:table-cell>
          <table:table-cell office:value-type="float" office:value="471610" calcext:value-type="float">
            <text:p>471610</text:p>
          </table:table-cell>
          <table:table-cell/>
        </table:table-row>
        <table:table-row table:style-name="ro1">
          <table:table-cell office:value-type="string" calcext:value-type="string">
            <text:p>grid80x80.f10_direct.wcnf</text:p>
          </table:table-cell>
          <table:table-cell office:value-type="float" office:value="3256634" calcext:value-type="float">
            <text:p>3256634</text:p>
          </table:table-cell>
          <table:table-cell office:value-type="float" office:value="3322266" calcext:value-type="float">
            <text:p>3322266</text:p>
          </table:table-cell>
          <table:table-cell/>
        </table:table-row>
        <table:table-row table:style-name="ro1">
          <table:table-cell office:value-type="string" calcext:value-type="string">
            <text:p>grid20x20.f15.wrap_direct.wcnf</text:p>
          </table:table-cell>
          <table:table-cell office:value-type="float" office:value="253479" calcext:value-type="float">
            <text:p>253479</text:p>
          </table:table-cell>
          <table:table-cell office:value-type="float" office:value="153949" calcext:value-type="float">
            <text:p>153949</text:p>
          </table:table-cell>
          <table:table-cell/>
        </table:table-row>
        <table:table-row table:style-name="ro1">
          <table:table-cell office:value-type="string" calcext:value-type="string">
            <text:p>grid80x80.f15.wrap_direct.wcnf</text:p>
          </table:table-cell>
          <table:table-cell office:value-type="float" office:value="4945410" calcext:value-type="float">
            <text:p>4945410</text:p>
          </table:table-cell>
          <table:table-cell office:value-type="float" office:value="5108657" calcext:value-type="float">
            <text:p>5108657</text:p>
          </table:table-cell>
          <table:table-cell/>
        </table:table-row>
        <table:table-row table:style-name="ro1">
          <table:table-cell office:value-type="string" calcext:value-type="string">
            <text:p>grid40x40.f10.wrap_direct.wcnf</text:p>
          </table:table-cell>
          <table:table-cell office:value-type="float" office:value="836726" calcext:value-type="float">
            <text:p>836726</text:p>
          </table:table-cell>
          <table:table-cell office:value-type="float" office:value="934635" calcext:value-type="float">
            <text:p>934635</text:p>
          </table:table-cell>
          <table:table-cell/>
        </table:table-row>
        <table:table-row table:style-name="ro1">
          <table:table-cell office:value-type="string" calcext:value-type="string">
            <text:p>grid80x80.f5.wrap_direct.wcnf</text:p>
          </table:table-cell>
          <table:table-cell office:value-type="float" office:value="1815260" calcext:value-type="float">
            <text:p>1815260</text:p>
          </table:table-cell>
          <table:table-cell office:value-type="float" office:value="1866498" calcext:value-type="float">
            <text:p>1866498</text:p>
          </table:table-cell>
          <table:table-cell/>
        </table:table-row>
        <table:table-row table:style-name="ro1">
          <table:table-cell office:value-type="string" calcext:value-type="string">
            <text:p>grid80x80.f5_direct.wcnf</text:p>
          </table:table-cell>
          <table:table-cell office:value-type="float" office:value="1794141" calcext:value-type="float">
            <text:p>1794141</text:p>
          </table:table-cell>
          <table:table-cell office:value-type="float" office:value="1859824" calcext:value-type="float">
            <text:p>1859824</text:p>
          </table:table-cell>
          <table:table-cell/>
        </table:table-row>
        <table:table-row table:style-name="ro1">
          <table:table-cell office:value-type="string" calcext:value-type="string">
            <text:p>grid20x20.f10_direct.wcnf</text:p>
          </table:table-cell>
          <table:table-cell office:value-type="float" office:value="165630" calcext:value-type="float">
            <text:p>165630</text:p>
          </table:table-cell>
          <table:table-cell office:value-type="float" office:value="98511" calcext:value-type="float">
            <text:p>98511</text:p>
          </table:table-cell>
          <table:table-cell/>
        </table:table-row>
        <table:table-row table:style-name="ro1">
          <table:table-cell office:value-type="string" calcext:value-type="string">
            <text:p>grid80x80.f2.wrap_direct.wcnf</text:p>
          </table:table-cell>
          <table:table-cell office:value-type="float" office:value="864290" calcext:value-type="float">
            <text:p>864290</text:p>
          </table:table-cell>
          <table:table-cell office:value-type="float" office:value="948534" calcext:value-type="float">
            <text:p>948534</text:p>
          </table:table-cell>
          <table:table-cell/>
        </table:table-row>
        <table:table-row table:style-name="ro1">
          <table:table-cell office:value-type="string" calcext:value-type="string">
            <text:p>grid80x80.f15_direct.wcnf</text:p>
          </table:table-cell>
          <table:table-cell office:value-type="float" office:value="4780755" calcext:value-type="float">
            <text:p>4780755</text:p>
          </table:table-cell>
          <table:table-cell office:value-type="float" office:value="4827719" calcext:value-type="float">
            <text:p>4827719</text:p>
          </table:table-cell>
          <table:table-cell/>
        </table:table-row>
        <table:table-row table:style-name="ro1">
          <table:table-cell office:value-type="string" calcext:value-type="string">
            <text:p>grid80x80.f10.wrap_direct.wcnf</text:p>
          </table:table-cell>
          <table:table-cell office:value-type="float" office:value="3354858" calcext:value-type="float">
            <text:p>3354858</text:p>
          </table:table-cell>
          <table:table-cell office:value-type="float" office:value="3412185" calcext:value-type="float">
            <text:p>3412185</text:p>
          </table:table-cell>
          <table:table-cell/>
        </table:table-row>
        <table:table-row table:style-name="ro1">
          <table:table-cell office:value-type="string" calcext:value-type="string">
            <text:p>grid40x40.f2.wrap_direct.wcnf</text:p>
          </table:table-cell>
          <table:table-cell office:value-type="float" office:value="211780" calcext:value-type="float">
            <text:p>211780</text:p>
          </table:table-cell>
          <table:table-cell office:value-type="float" office:value="234830" calcext:value-type="float">
            <text:p>234830</text:p>
          </table:table-cell>
          <table:table-cell/>
        </table:table-row>
        <table:table-row table:style-name="ro1">
          <table:table-cell office:value-type="string" calcext:value-type="string">
            <text:p>grid80x80.f2_direct.wcnf</text:p>
          </table:table-cell>
          <table:table-cell office:value-type="float" office:value="853487" calcext:value-type="float">
            <text:p>853487</text:p>
          </table:table-cell>
          <table:table-cell office:value-type="float" office:value="932871" calcext:value-type="float">
            <text:p>932871</text:p>
          </table:table-cell>
          <table:table-cell/>
        </table:table-row>
        <table:table-row table:style-name="ro1">
          <table:table-cell office:value-type="string" calcext:value-type="string">
            <text:p>grid20x20.f10.wrap_direct.wcnf</text:p>
          </table:table-cell>
          <table:table-cell office:value-type="float" office:value="169753" calcext:value-type="float">
            <text:p>169753</text:p>
          </table:table-cell>
          <table:table-cell office:value-type="float" office:value="130575" calcext:value-type="float">
            <text:p>130575</text:p>
          </table:table-cell>
          <table:table-cell/>
        </table:table-row>
        <table:table-row table:style-name="ro1">
          <table:table-cell office:value-type="string" calcext:value-type="string">
            <text:p>grid40x40.f15_direct.wcnf</text:p>
          </table:table-cell>
          <table:table-cell office:value-type="float" office:value="1105628" calcext:value-type="float">
            <text:p>1105628</text:p>
          </table:table-cell>
          <table:table-cell office:value-type="float" office:value="1253321" calcext:value-type="float">
            <text:p>1253321</text:p>
          </table:table-cell>
          <table:table-cell/>
        </table:table-row>
        <table:table-row table:style-name="ro1">
          <table:table-cell office:value-type="string" calcext:value-type="string">
            <text:p>grid20x20.f5.wrap_direct.wcnf</text:p>
          </table:table-cell>
          <table:table-cell office:value-type="float" office:value="97932" calcext:value-type="float">
            <text:p>97932</text:p>
          </table:table-cell>
          <table:table-cell office:value-type="float" office:value="60095" calcext:value-type="float">
            <text:p>60095</text:p>
          </table:table-cell>
          <table:table-cell/>
        </table:table-row>
        <table:table-row table:style-name="ro1">
          <table:table-cell office:value-type="string" calcext:value-type="string">
            <text:p>grid40x40.f5.wrap_direct.wcnf</text:p>
          </table:table-cell>
          <table:table-cell office:value-type="float" office:value="445288" calcext:value-type="float">
            <text:p>445288</text:p>
          </table:table-cell>
          <table:table-cell office:value-type="float" office:value="486984" calcext:value-type="float">
            <text:p>486984</text:p>
          </table:table-cell>
          <table:table-cell/>
        </table:table-row>
        <table:table-row table:style-name="ro1">
          <table:table-cell office:value-type="string" calcext:value-type="string">
            <text:p>grid40x40.f15.wrap_direct.wcnf</text:p>
          </table:table-cell>
          <table:table-cell office:value-type="float" office:value="1214055" calcext:value-type="float">
            <text:p>1214055</text:p>
          </table:table-cell>
          <table:table-cell office:value-type="float" office:value="1359798" calcext:value-type="float">
            <text:p>1359798</text:p>
          </table:table-cell>
          <table:table-cell/>
        </table:table-row>
        <table:table-row table:style-name="ro1">
          <table:table-cell office:value-type="string" calcext:value-type="string">
            <text:p>grid40x40.f2_direct.wcnf</text:p>
          </table:table-cell>
          <table:table-cell office:value-type="float" office:value="199325" calcext:value-type="float">
            <text:p>199325</text:p>
          </table:table-cell>
          <table:table-cell office:value-type="float" office:value="237266" calcext:value-type="float">
            <text:p>2372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09:25:18.942795489</meta:creation-date>
    <dc:date>2026-05-19T10:40:40.064265324</dc:date>
    <meta:editing-duration>PT1H4M32S</meta:editing-duration>
    <meta:editing-cycles>2</meta:editing-cycles>
    <meta:generator>LibreOffice/24.2.7.2$Linux_X86_64 LibreOffice_project/420$Build-2</meta:generator>
    <meta:document-statistic meta:table-count="1" meta:cell-count="64" meta:object-count="0"/>
  </office:meta>
</office:document-meta>
</file>