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62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3.6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Weight_new_model</text:p>
          </table:table-cell>
          <table:table-cell office:value-type="string" calcext:value-type="string">
            <text:p>Time new model</text:p>
          </table:table-cell>
          <table:table-cell office:value-type="string" calcext:value-type="string">
            <text:p>Weight_old_model</text:p>
          </table:table-cell>
          <table:table-cell office:value-type="string" calcext:value-type="string">
            <text:p>Time_old_model</text:p>
          </table:table-cell>
          <table:table-cell office:value-type="string" calcext:value-type="string">
            <text:p>Résultats mon modèle vs ancien</text:p>
          </table:table-cell>
        </table:table-row>
        <table:table-row table:style-name="ro1">
          <table:table-cell office:value-type="string" calcext:value-type="string">
            <text:p>grid80x80.f10_direct.wcnf</text:p>
          </table:table-cell>
          <table:table-cell office:value-type="float" office:value="1557872" calcext:value-type="float">
            <text:p>1557872</text:p>
          </table:table-cell>
          <table:table-cell office:value-type="string" calcext:value-type="string">
            <text:p>300.047</text:p>
          </table:table-cell>
          <table:table-cell office:value-type="float" office:value="1561453" calcext:value-type="float">
            <text:p>1561453</text:p>
          </table:table-cell>
          <table:table-cell office:value-type="float" office:value="300" calcext:value-type="float">
            <text:p>300</text:p>
          </table:table-cell>
          <table:table-cell table:formula="of:=IF([.B2]&lt;[.D2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10.wrap_direct.wcnf</text:p>
          </table:table-cell>
          <table:table-cell office:value-type="float" office:value="1649482" calcext:value-type="float">
            <text:p>1649482</text:p>
          </table:table-cell>
          <table:table-cell office:value-type="string" calcext:value-type="string">
            <text:p>300.038</text:p>
          </table:table-cell>
          <table:table-cell office:value-type="float" office:value="1702156" calcext:value-type="float">
            <text:p>1702156</text:p>
          </table:table-cell>
          <table:table-cell office:value-type="float" office:value="300" calcext:value-type="float">
            <text:p>300</text:p>
          </table:table-cell>
          <table:table-cell table:formula="of:=IF([.B3]&lt;[.D3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15_direct.wcnf</text:p>
          </table:table-cell>
          <table:table-cell office:value-type="float" office:value="2202492" calcext:value-type="float">
            <text:p>2202492</text:p>
          </table:table-cell>
          <table:table-cell office:value-type="string" calcext:value-type="string">
            <text:p>300.038</text:p>
          </table:table-cell>
          <table:table-cell office:value-type="float" office:value="3460573" calcext:value-type="float">
            <text:p>3460573</text:p>
          </table:table-cell>
          <table:table-cell office:value-type="float" office:value="300" calcext:value-type="float">
            <text:p>300</text:p>
          </table:table-cell>
          <table:table-cell table:formula="of:=IF([.B4]&lt;[.D4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15.wrap_direct.wcnf</text:p>
          </table:table-cell>
          <table:table-cell office:value-type="float" office:value="2299326" calcext:value-type="float">
            <text:p>2299326</text:p>
          </table:table-cell>
          <table:table-cell office:value-type="string" calcext:value-type="string">
            <text:p>300.04</text:p>
          </table:table-cell>
          <table:table-cell office:value-type="float" office:value="2433688" calcext:value-type="float">
            <text:p>2433688</text:p>
          </table:table-cell>
          <table:table-cell office:value-type="float" office:value="300" calcext:value-type="float">
            <text:p>300</text:p>
          </table:table-cell>
          <table:table-cell table:formula="of:=IF([.B5]&lt;[.D5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grid80x80.f2_direct.wcnf</text:p>
          </table:table-cell>
          <table:table-cell office:value-type="float" office:value="511491" calcext:value-type="float">
            <text:p>511491</text:p>
          </table:table-cell>
          <table:table-cell office:value-type="string" calcext:value-type="string">
            <text:p>31.9895</text:p>
          </table:table-cell>
          <table:table-cell office:value-type="float" office:value="511458" calcext:value-type="float">
            <text:p>511458</text:p>
          </table:table-cell>
          <table:table-cell office:value-type="float" office:value="29.14" calcext:value-type="float">
            <text:p>29,14</text:p>
          </table:table-cell>
          <table:table-cell table:formula="of:=IF([.B6]&lt;[.D6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grid80x80.f2.wrap_direct.wcnf</text:p>
          </table:table-cell>
          <table:table-cell office:value-type="float" office:value="514249" calcext:value-type="float">
            <text:p>514249</text:p>
          </table:table-cell>
          <table:table-cell office:value-type="string" calcext:value-type="string">
            <text:p>32.8934</text:p>
          </table:table-cell>
          <table:table-cell office:value-type="float" office:value="514152" calcext:value-type="float">
            <text:p>514152</text:p>
          </table:table-cell>
          <table:table-cell office:value-type="float" office:value="27.69" calcext:value-type="float">
            <text:p>27,69</text:p>
          </table:table-cell>
          <table:table-cell table:formula="of:=IF([.B7]&lt;[.D7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grid80x80.f5_direct.wcnf</text:p>
          </table:table-cell>
          <table:table-cell office:value-type="float" office:value="918245" calcext:value-type="float">
            <text:p>918245</text:p>
          </table:table-cell>
          <table:table-cell office:value-type="string" calcext:value-type="string">
            <text:p>300.04</text:p>
          </table:table-cell>
          <table:table-cell office:value-type="float" office:value="917776" calcext:value-type="float">
            <text:p>917776</text:p>
          </table:table-cell>
          <table:table-cell office:value-type="float" office:value="300" calcext:value-type="float">
            <text:p>300</text:p>
          </table:table-cell>
          <table:table-cell table:formula="of:=IF([.B8]&lt;[.D8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grid80x80.f5.wrap_direct.wcnf</text:p>
          </table:table-cell>
          <table:table-cell office:value-type="float" office:value="952140" calcext:value-type="float">
            <text:p>952140</text:p>
          </table:table-cell>
          <table:table-cell office:value-type="string" calcext:value-type="string">
            <text:p>300.04</text:p>
          </table:table-cell>
          <table:table-cell office:value-type="float" office:value="952879" calcext:value-type="float">
            <text:p>952879</text:p>
          </table:table-cell>
          <table:table-cell office:value-type="float" office:value="300" calcext:value-type="float">
            <text:p>300</text:p>
          </table:table-cell>
          <table:table-cell table:formula="of:=IF([.B9]&lt;[.D9];&quot;MEILLEUR&quot;;&quot;MOINS BON&quot;)" office:value-type="string" office:string-value="MEILLEUR" calcext:value-type="string">
            <text:p>MEILL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16:32:28.038096602</meta:creation-date>
    <dc:date>2026-06-03T16:49:57.468852140</dc:date>
    <meta:editing-duration>PT5M47S</meta:editing-duration>
    <meta:editing-cycles>4</meta:editing-cycles>
    <meta:generator>LibreOffice/24.2.7.2$Linux_X86_64 LibreOffice_project/420$Build-2</meta:generator>
    <meta:document-statistic meta:table-count="1" meta:cell-count="54" meta:object-count="0"/>
  </office:meta>
</office:document-meta>
</file>