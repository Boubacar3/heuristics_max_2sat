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82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5.00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Violated_weights_new_model</text:p>
          </table:table-cell>
          <table:table-cell office:value-type="string" calcext:value-type="string">
            <text:p>Time_new_model</text:p>
          </table:table-cell>
          <table:table-cell office:value-type="string" calcext:value-type="string">
            <text:p>Violated_weights_old_CPLEX</text:p>
          </table:table-cell>
          <table:table-cell office:value-type="string" calcext:value-type="string">
            <text:p>Time_CPLEX</text:p>
          </table:table-cell>
          <table:table-cell office:value-type="string" calcext:value-type="string">
            <text:p>Comparaison mon modèle vs CPLEX</text:p>
          </table:table-cell>
        </table:table-row>
        <table:table-row table:style-name="ro1">
          <table:table-cell office:value-type="string" calcext:value-type="string">
            <text:p>grid80x80.f10_direct.wcnf</text:p>
          </table:table-cell>
          <table:table-cell office:value-type="float" office:value="1555353" calcext:value-type="float">
            <text:p>1555353</text:p>
          </table:table-cell>
          <table:table-cell office:value-type="string" calcext:value-type="string">
            <text:p>2307.79</text:p>
          </table:table-cell>
          <table:table-cell office:value-type="float" office:value="1555573" calcext:value-type="float">
            <text:p>1555573</text:p>
          </table:table-cell>
          <table:table-cell office:value-type="float" office:value="3600" calcext:value-type="float">
            <text:p>3600</text:p>
          </table:table-cell>
          <table:table-cell table:formula="of:=IF([.B2]&lt;=[.D2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grid80x80.f10.wrap_direct.wcnf</text:p>
          </table:table-cell>
          <table:table-cell office:value-type="float" office:value="1634292" calcext:value-type="float">
            <text:p>1634292</text:p>
          </table:table-cell>
          <table:table-cell office:value-type="string" calcext:value-type="string">
            <text:p>3600.04</text:p>
          </table:table-cell>
          <table:table-cell office:value-type="float" office:value="1634797" calcext:value-type="float">
            <text:p>1634797</text:p>
          </table:table-cell>
          <table:table-cell office:value-type="float" office:value="3600" calcext:value-type="float">
            <text:p>3600</text:p>
          </table:table-cell>
          <table:table-cell table:formula="of:=IF([.B3]&lt;=[.D3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grid80x80.f15_direct.wcnf</text:p>
          </table:table-cell>
          <table:table-cell office:value-type="float" office:value="2191487" calcext:value-type="float">
            <text:p>2191487</text:p>
          </table:table-cell>
          <table:table-cell office:value-type="string" calcext:value-type="string">
            <text:p>3600.04</text:p>
          </table:table-cell>
          <table:table-cell office:value-type="float" office:value="2194429" calcext:value-type="float">
            <text:p>2194429</text:p>
          </table:table-cell>
          <table:table-cell office:value-type="float" office:value="3600" calcext:value-type="float">
            <text:p>3600</text:p>
          </table:table-cell>
          <table:table-cell table:formula="of:=IF([.B4]&lt;=[.D4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grid80x80.f15.wrap_direct.wcnf</text:p>
          </table:table-cell>
          <table:table-cell office:value-type="float" office:value="2274608" calcext:value-type="float">
            <text:p>2274608</text:p>
          </table:table-cell>
          <table:table-cell office:value-type="string" calcext:value-type="string">
            <text:p>3600.04</text:p>
          </table:table-cell>
          <table:table-cell office:value-type="float" office:value="2275750" calcext:value-type="float">
            <text:p>2275750</text:p>
          </table:table-cell>
          <table:table-cell office:value-type="float" office:value="3600" calcext:value-type="float">
            <text:p>3600</text:p>
          </table:table-cell>
          <table:table-cell table:formula="of:=IF([.B5]&lt;=[.D5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grid80x80.f2_direct.wcnf</text:p>
          </table:table-cell>
          <table:table-cell office:value-type="float" office:value="511424" calcext:value-type="float">
            <text:p>511424</text:p>
          </table:table-cell>
          <table:table-cell office:value-type="string" calcext:value-type="string">
            <text:p>29.2759</text:p>
          </table:table-cell>
          <table:table-cell office:value-type="float" office:value="511424" calcext:value-type="float">
            <text:p>511424</text:p>
          </table:table-cell>
          <table:table-cell office:value-type="string" calcext:value-type="string">
            <text:p>32.36</text:p>
          </table:table-cell>
          <table:table-cell table:formula="of:=IF([.B6]&lt;=[.D6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grid80x80.f2.wrap_direct.wcnf</text:p>
          </table:table-cell>
          <table:table-cell office:value-type="float" office:value="514152" calcext:value-type="float">
            <text:p>514152</text:p>
          </table:table-cell>
          <table:table-cell office:value-type="string" calcext:value-type="string">
            <text:p>28.1835</text:p>
          </table:table-cell>
          <table:table-cell office:value-type="float" office:value="514152" calcext:value-type="float">
            <text:p>514152</text:p>
          </table:table-cell>
          <table:table-cell office:value-type="string" calcext:value-type="string">
            <text:p>33.70</text:p>
          </table:table-cell>
          <table:table-cell table:formula="of:=IF([.B7]&lt;=[.D7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grid80x80.f5_direct.wcnf</text:p>
          </table:table-cell>
          <table:table-cell office:value-type="float" office:value="917776" calcext:value-type="float">
            <text:p>917776</text:p>
          </table:table-cell>
          <table:table-cell office:value-type="string" calcext:value-type="string">
            <text:p>640.11</text:p>
          </table:table-cell>
          <table:table-cell office:value-type="float" office:value="917776" calcext:value-type="float">
            <text:p>917776</text:p>
          </table:table-cell>
          <table:table-cell office:value-type="string" calcext:value-type="string">
            <text:p>826.26</text:p>
          </table:table-cell>
          <table:table-cell table:formula="of:=IF([.B8]&lt;=[.D8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grid80x80.f5.wrap_direct.wcnf</text:p>
          </table:table-cell>
          <table:table-cell office:value-type="float" office:value="950425" calcext:value-type="float">
            <text:p>950425</text:p>
          </table:table-cell>
          <table:table-cell office:value-type="string" calcext:value-type="string">
            <text:p>1059.82</text:p>
          </table:table-cell>
          <table:table-cell office:value-type="float" office:value="950425" calcext:value-type="float">
            <text:p>950425</text:p>
          </table:table-cell>
          <table:table-cell office:value-type="string" calcext:value-type="string">
            <text:p>2390.88</text:p>
          </table:table-cell>
          <table:table-cell table:formula="of:=IF([.B9]&lt;=[.D9];&quot;MEILLEUR&quot;;&quot;MOINS BON&quot;)" office:value-type="string" office:string-value="MEILLEUR" calcext:value-type="string">
            <text:p>MEILLE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0T11:35:13.439784385</meta:creation-date>
    <meta:generator>LibreOffice/24.2.7.2$Linux_X86_64 LibreOffice_project/420$Build-2</meta:generator>
    <dc:date>2026-06-10T14:54:36.958855514</dc:date>
    <meta:editing-duration>PT2H56M25S</meta:editing-duration>
    <meta:editing-cycles>2</meta:editing-cycles>
    <meta:document-statistic meta:table-count="1" meta:cell-count="54" meta:object-count="0"/>
  </office:meta>
</office:document-meta>
</file>